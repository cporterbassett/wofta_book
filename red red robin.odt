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en The Red Red Robin Comes Bob Bob Bobbin' Along</text:p>
      <text:p text:style-name="P1"/>
      <text:p text:style-name="P2">G7 <text:s text:c="17"/>C</text:p>
      <text:p text:style-name="P1">When the red, red, robin comes</text:p>
      <text:p text:style-name="P2">G7 <text:s text:c="17"/>C</text:p>
      <text:p text:style-name="P1">Bob, bob, bobbin' along, along,</text:p>
      <text:p text:style-name="P1"><text:s text:c="14"/><text:span text:style-name="T1"><text:s text:c="6"/>C</text:span></text:p>
      <text:p text:style-name="P1">There'll be no more sobbing when</text:p>
      <text:p text:style-name="P2">G7 <text:s text:c="17"/>C <text:s text:c="11"/>C7</text:p>
      <text:p text:style-name="P1">He starts throbbin' his old, sweet song.</text:p>
      <text:p text:style-name="P1"/>
      <text:p text:style-name="P2">F</text:p>
      <text:p text:style-name="P1">Wake up! Wake up, you sleepy head!</text:p>
      <text:p text:style-name="P2">C</text:p>
      <text:p text:style-name="P1">Get up! Get up! Get out of bed!</text:p>
      <text:p text:style-name="P2">D</text:p>
      <text:p text:style-name="P1">Cheer up! Cheer up! The sun is red!</text:p>
      <text:p text:style-name="P2">G7</text:p>
      <text:p text:style-name="P1">Live, love, laugh, and be happy!</text:p>
      <text:p text:style-name="P1"/>
      <text:p text:style-name="P2">C</text:p>
      <text:p text:style-name="P1">What if I've been blue</text:p>
      <text:p text:style-name="P2">G7 <text:s text:c="17"/>C</text:p>
      <text:p text:style-name="P1">Now that I'm walking through fields of flow'rs?</text:p>
      <text:p text:style-name="P2">C</text:p>
      <text:p text:style-name="P1">Rain may glisten but</text:p>
      <text:p text:style-name="P2">G7 <text:s text:c="7"/>C <text:s text:c="7"/>C7</text:p>
      <text:p text:style-name="P1">Still I listen for hours and hours.</text:p>
      <text:p text:style-name="P1"/>
      <text:p text:style-name="P2">F</text:p>
      <text:p text:style-name="P1">I'm just a kid again</text:p>
      <text:p text:style-name="P2">Fm <text:s text:c="17"/>Adim</text:p>
      <text:p text:style-name="P1">Doin' what I did again</text:p>
      <text:p text:style-name="P2"><text:s text:c="20"/>C</text:p>
      <text:p text:style-name="P1">Singin' a song</text:p>
      <text:p text:style-name="P1"/>
      <text:p text:style-name="P2">C <text:s text:c="18"/>G7</text:p>
      <text:p text:style-name="P1">When the red, red, robin comes</text:p>
      <text:p text:style-name="P2">C <text:s text:c="18"/>G7 <text:s text:c="8"/>C</text:p>
      <text:p text:style-name="P1">Bob, bob, bobbin' alo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21:00:08.141088595</meta:creation-date>
    <dc:date>2026-06-25T21:01:32.896340116</dc:date>
    <meta:editing-duration>PT1M25S</meta:editing-duration>
    <meta:editing-cycles>1</meta:editing-cycles>
    <meta:document-statistic meta:table-count="0" meta:image-count="0" meta:object-count="0" meta:page-count="1" meta:paragraph-count="35" meta:word-count="138" meta:character-count="796" meta:non-whitespace-character-count="499"/>
    <meta:generator>LibreOffice/24.2.7.2$Linux_X86_64 LibreOffice_project/420$Build-2</meta:generator>
  </office:meta>
</office:document-meta>
</file>