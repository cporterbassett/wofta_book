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master-page-name="HTML">
      <style:paragraph-properties style:page-number="auto"/>
      <style:text-properties style:font-name="Liberation Mono"/>
    </style:style>
    <style:style style:name="P2" style:family="paragraph" style:parent-style-name="Text_20_body">
      <style:text-properties style:font-name="Liberation Mono"/>
    </style:style>
    <style:style style:name="P3" style:family="paragraph" style:parent-style-name="Text_20_body">
      <style:text-properties style:font-name="Liberation Mono" fo:font-weight="normal" style:font-weight-asian="normal" style:font-weight-complex="normal"/>
    </style:style>
    <style:style style:name="P4" style:family="paragraph" style:parent-style-name="Text_20_body">
      <style:text-properties style:font-name="Liberation Mono" fo:font-weight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mtree Canoe</text:p>
      <text:p text:style-name="P2"><text:span text:style-name="T1">[G]</text:span>On the Tom Bigbee river so <text:span text:style-name="T1">[C]</text:span>bright I was <text:span text:style-name="T1">[G]</text:span>born<text:line-break/>In a <text:span text:style-name="T1">[G]</text:span>hut made of husks of the <text:span text:style-name="T1">[D7]</text:span>tall yellow corn<text:line-break/>An <text:span text:style-name="T1">[G]</text:span>there I first spied my <text:span text:style-name="T1">[C]</text:span>Julia so <text:span text:style-name="T1">[G]</text:span>true<text:line-break/>An I <text:span text:style-name="T1">[G]</text:span>rowed her about In my <text:span text:style-name="T1">[D7]</text:span>Gum Tree Ca<text:span text:style-name="T1">[G]</text:span>noe </text:p>
      <text:p text:style-name="P3"><text:span text:style-name="T2">[Chorus]</text:span><text:line-break/>Singing <text:span text:style-name="T2">[G]</text:span>row away row, O'er the <text:span text:style-name="T2">[C]</text:span>waters so blue<text:line-break/>Like a <text:span text:style-name="T2">[D7]</text:span>feather we'll float, In our gum tree ca<text:span text:style-name="T2">[G]</text:span>noe<text:line-break/>Singing <text:span text:style-name="T2">[G]</text:span>row away row, O'er the <text:span text:style-name="T2">[C]</text:span>water so blue<text:line-break/>Like a <text:span text:style-name="T2">[D7]</text:span>feather we'll float, In our gum tree ca<text:span text:style-name="T2">[G]</text:span>noe<text:line-break/><text:span text:style-name="T2">[inst over verse prog.] </text:span></text:p>
      <text:p text:style-name="P2"><text:span text:style-name="T1">[G]</text:span>All day in the fields of soft <text:span text:style-name="T1">[C]</text:span>cotton I'd <text:span text:style-name="T1">[G]</text:span>hoe<text:line-break/>An' I'd <text:span text:style-name="T1">[G]</text:span>think of my Julia and <text:span text:style-name="T1">[D7]</text:span>singin' as we'd go<text:line-break/>An' I'd <text:span text:style-name="T1">[G]</text:span>catch her a bird, with a <text:span text:style-name="T1">[C]</text:span>wing of true <text:span text:style-name="T1">[G]</text:span>blue<text:line-break/>An' at <text:span text:style-name="T1">[G]</text:span>night sail around in my <text:span text:style-name="T1">[D7]</text:span>gum tree ca<text:span text:style-name="T1">[G]</text:span>noe </text:p>
      <text:p text:style-name="P4">[Chorus] [inst over verse prog.]</text:p>
      <text:p text:style-name="P2">With my <text:span text:style-name="T1">[G]</text:span>hands on the banjo and a<text:span text:style-name="T1">[C]</text:span>toe on the <text:span text:style-name="T1">[G]</text:span>oar<text:line-break/>I'd sing to the <text:span text:style-name="T1">[G]</text:span>sound of the <text:span text:style-name="T1">[D7]</text:span>rivers soft roar;<text:line-break/>While the <text:span text:style-name="T1">[G]</text:span>stars they looked down on my <text:span text:style-name="T1">[C]</text:span>Julia so <text:span text:style-name="T1">[G]</text:span>true<text:line-break/>An' <text:span text:style-name="T1">[G]</text:span>danced in her eyes in my <text:span text:style-name="T1">[D7]</text:span>gum tree ca<text:span text:style-name="T1">[G]</text:span>noe </text:p>
      <text:p text:style-name="P4">[Chorus] [inst over verse prog.]</text:p>
      <text:p text:style-name="P2">One <text:span text:style-name="T1">[G]</text:span>day the stream bore us <text:span text:style-name="T1">[C]</text:span>so far a<text:span text:style-name="T1">[G]</text:span>way,<text:line-break/>That we <text:span text:style-name="T1">[G]</text:span>couldn't come back so we <text:span text:style-name="T1">[D7]</text:span>thought we'd just stay,<text:line-break/>Then, we <text:span text:style-name="T1">[G]</text:span>spied a tall ship with a <text:span text:style-name="T1">[C]</text:span>flag of true <text:span text:style-name="T1">[G]</text:span>blue,<text:line-break/>And it <text:span text:style-name="T1">[G]</text:span>took us in tow in our <text:span text:style-name="T1">[D7]</text:span>gum-tree ca<text:span text:style-name="T1">[G]</text:span>noe. </text:p>
      <text:p text:style-name="P4">[Chorus] [inst over verse prog.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FreeSans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Noto Sans" fo:font-family="'Noto San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mtree Canoe</dc:title>
    <meta:generator>LibreOffice/24.2.7.2$Linux_X86_64 LibreOffice_project/420$Build-2</meta:generator>
    <dc:date>2026-06-25T21:10:24.947117255</dc:date>
    <meta:editing-duration>PT1M48S</meta:editing-duration>
    <meta:editing-cycles>2</meta:editing-cycles>
    <meta:document-statistic meta:table-count="0" meta:image-count="0" meta:object-count="0" meta:page-count="1" meta:paragraph-count="9" meta:word-count="227" meta:character-count="1250" meta:non-whitespace-character-count="1027"/>
    <meta:user-defined meta:name=""/>
  </office:meta>
</office:document-meta>
</file>