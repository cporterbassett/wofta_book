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  <style:style style:name="P2" style:family="paragraph" style:parent-style-name="Standard">
      <style:text-properties style:font-name="Liberation Mono" fo:font-weight="bold" style:font-weight-asian="bold" style:font-weight-complex="bold"/>
    </style:style>
    <style:style style:name="P3" style:family="paragraph" style:parent-style-name="Title">
      <style:paragraph-properties fo:text-align="start" style:justify-single-word="false"/>
      <style:text-properties fo:font-size="20pt" style:font-size-asian="20pt" style:font-size-complex="20pt"/>
    </style:style>
    <style:style style:name="P4" style:family="paragraph" style:parent-style-name="Standard">
      <style:text-properties style:font-name="Liberation 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hat Shall We Do With the Drunken Sailor</text:p>
      <text:p text:style-name="P1">Traditional sea shanty</text:p>
      <text:p text:style-name="P1"/>
      <text:p text:style-name="P2">Em</text:p>
      <text:p text:style-name="P1">What shall we do with the drunken sailor,</text:p>
      <text:p text:style-name="P2">D</text:p>
      <text:p text:style-name="P1">What shall we do with the drunken sailor,</text:p>
      <text:p text:style-name="P2">Em</text:p>
      <text:p text:style-name="P1">What shall we do with the drunken sailor,</text:p>
      <text:p text:style-name="P2">D Em</text:p>
      <text:p text:style-name="P1">Earlye in the morning.</text:p>
      <text:p text:style-name="P1"/>
      <text:p text:style-name="P1">Way hay and up she rises</text:p>
      <text:p text:style-name="P1">Put him in a long boat till he’s sober</text:p>
      <text:p text:style-name="P1">Put him in the scuppers with the hosepipe on him,</text:p>
      <text:p text:style-name="P1">Hoist him aboard with a running bowline,</text:p>
      <text:p text:style-name="P1">Put him in the brig until he’s sober,</text:p>
      <text:p text:style-name="P1">Make him turn to at shining bright work,</text:p>
      <text:p text:style-name="P1">Put him in the bed with the Captain’s daughter,</text:p>
      <text:p text:style-name="P1">Shave his belly with a rusty razor,</text:p>
      <text:p text:style-name="P1">What shall we do with the drunken sailor,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5T21:00:08.141088595</meta:creation-date>
    <dc:date>2026-06-25T21:13:46.475482684</dc:date>
    <meta:editing-duration>PT8M55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19" meta:word-count="116" meta:character-count="567" meta:non-whitespace-character-count="470"/>
  </office:meta>
</office:document-meta>
</file>