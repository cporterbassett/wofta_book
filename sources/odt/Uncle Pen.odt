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CLE PEN</text:p>
      <text:p text:style-name="P1">Words and music by Bill Monroe</text:p>
      <text:p text:style-name="P1"/>
      <text:p text:style-name="P1"><text:span text:style-name="T1">[G]</text:span> Oh, the people would come from far away</text:p>
      <text:p text:style-name="P1">They'd dance all night till the <text:span text:style-name="T1">[D]</text:span> break of day <text:span text:style-name="T1">[G]</text:span></text:p>
      <text:p text:style-name="P1">When the caller hollered "do-si-do"</text:p>
      <text:p text:style-name="P1">You knew Uncle Pen was <text:span text:style-name="T1">[D]</text:span> ready to go. <text:span text:style-name="T1">[G] <text:s/>[G7]</text:span></text:p>
      <text:p text:style-name="P1"/>
      <text:p text:style-name="P1">CHORUS</text:p>
      <text:p text:style-name="P1"><text:span text:style-name="T1">[C]</text:span> Late in the ev'nin' a-<text:span text:style-name="T1">[G]</text:span> bout sundown</text:p>
      <text:p text:style-name="P1">High on the hill and a-<text:span text:style-name="T1">[D]</text:span> bove the town <text:span text:style-name="T1">[G]</text:span></text:p>
      <text:p text:style-name="P1">Well Uncle Pen played the fiddle, Lordy, how it would ring</text:p>
      <text:p text:style-name="P1">You could hear it talk, you could <text:span text:style-name="T1">[D]</text:span> hear it sing. <text:span text:style-name="T1">[G]</text:span></text:p>
      <text:p text:style-name="P1"/>
      <text:p text:style-name="P1">He played an old piece he called "Soldier's Joy"</text:p>
      <text:p text:style-name="P1">And the one he called "Boston Boy"</text:p>
      <text:p text:style-name="P1">The greatest of all was "Jenny Lynn"</text:p>
      <text:p text:style-name="P1">To me that's where fidd'lin' began.</text:p>
      <text:p text:style-name="P1"/>
      <text:p text:style-name="P1">CHORUS</text:p>
      <text:p text:style-name="P1"/>
      <text:p text:style-name="P1">I'll never forget that mournful day</text:p>
      <text:p text:style-name="P1">When Uncle Pen was called away</text:p>
      <text:p text:style-name="P1">They hung up his fiddle, they hung up his bow</text:p>
      <text:p text:style-name="P1">They knew it was time for him to go.</text:p>
      <text:p text:style-name="P1"/>
      <text:p text:style-name="P1">CHOR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20:30:44.417401553</meta:creation-date>
    <dc:date>2026-06-25T20:34:38.100808758</dc:date>
    <meta:editing-duration>PT3M5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148" meta:character-count="734" meta:non-whitespace-character-count="606"/>
  </office:meta>
</office:document-meta>
</file>